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Google Sans" officeooo:rsid="0005246e" officeooo:paragraph-rsid="0005246e"/>
    </style:style>
    <style:style style:name="P2" style:family="paragraph" style:parent-style-name="Heading_20_3">
      <style:text-properties style:font-name="Google Sans"/>
    </style:style>
    <style:style style:name="P3"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6"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7"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8"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9"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T1" style:family="text">
      <style:text-properties fo:font-weight="bold"/>
    </style:style>
    <style:style style:name="T2" style:family="text">
      <style:text-properties style:font-name="Google Sans Text" fo:font-weight="bold"/>
    </style:style>
    <style:style style:name="T3" style:family="text">
      <style:text-properties style:font-name="Google Sans Tex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Jose Manuel Briceno Mendoza<text:line-break/>2026/06/01 yymmdd</text:h>
      <text:h text:style-name="P2" text:outline-level="3">Propuesta de Preprint: "Sobre una familia de enteros con propiedades de cobertura par continua"</text:h>
      <text:h text:style-name="P3" text:outline-level="4">1. Resumen</text:h>
      <text:p text:style-name="P4">En este estudio, presentamos una familia de números enteros definidos por una propiedad de <text:span text:style-name="T1">continuidad par estricta</text:span>. Demostramos que estos números, al descomponerse en sus potencias de 2 (posiciones), generan un conjunto de sumas que cubre la secuencia de números pares $\{2, 4, \dots, 2n\}$ sin interrupciones. Analizamos la progresión de estos números y demostramos su relación con los números de Jacobsthal, proponiendo una clasificación basada en la densidad de bits y la eficiencia de cobertura.</text:p>
      <text:h text:style-name="P3" text:outline-level="4">2. Introducción</text:h>
      <text:list text:style-name="L1">
        <text:list-item>
          <text:p text:style-name="P5"><text:span text:style-name="T1">Definición del problema:</text:span> Definir qué es un "conjunto de cobertura par". Un número es "C-par" si la suma de todas las combinaciones de sus posiciones activas (potencias de 2) resulta en un conjunto contiguo de números pares.</text:p>
        </text:list-item>
        <text:list-item>
          <text:p text:style-name="P5"><text:span text:style-name="T1">El objetivo:</text:span> Clasificar estos números y entender la regla recursiva que los genera.</text:p>
        </text:list-item>
      </text:list>
      <text:h text:style-name="P3" text:outline-level="4">3. Metodología: El Algoritmo de Continuidad</text:h>
      <text:p text:style-name="P4">Para este estudio, se ha implementado un filtro de búsqueda exhaustiva que realiza las siguientes operaciones sobre cada entero $n$:</text:p>
      <text:list text:style-name="L2">
        <text:list-item>
          <text:p text:style-name="P6"><text:span text:style-name="T1">Descomposición binaria:</text:span> $n \rightarrow \{p_1, p_2, \dots, p_k\}$ donde $p$ son los exponentes de las potencias de 2.</text:p>
        </text:list-item>
        <text:list-item>
          <text:p text:style-name="P6"><text:span text:style-name="T1">Generación de Sumset:</text:span> Se calcula el conjunto de sumas $S = \{p_i + p_j \mid i \le j\}$.</text:p>
        </text:list-item>
        <text:list-item>
          <text:p text:style-name="P6"><text:span text:style-name="T1">Filtro de Continuidad:</text:span> Se verifica que $\{s \in S \mid s \equiv 0 \pmod 2\} = \{2, 4, \dots, 2k\}$.</text:p>
        </text:list-item>
      </text:list>
      <text:h text:style-name="P3" text:outline-level="4">4. Análisis de la Progresión</text:h>
      <text:p text:style-name="P4">A partir de los resultados obtenidos, identificamos que los números siguen dos reglas de recurrencia fundamentales:</text:p>
      <text:list text:style-name="L3">
        <text:list-item>
          <text:p text:style-name="P7"><text:span text:style-name="T1">Regla de expansión:</text:span> $a_n = 2a_{n-1} + 1$ (para pasos impares)</text:p>
        </text:list-item>
        <text:list-item>
          <text:p text:style-name="P7"><text:span text:style-name="T1">Regla de ajuste:</text:span> $a_n = 2a_{n-1} - 1$ (para pasos pares)</text:p>
        </text:list-item>
      </text:list>
      <text:p text:style-name="P4">Esta alternancia es la que permite que el bit "1" más significativo se desplace de forma que siempre "rellene" los huecos necesarios en la suma de potencias, manteniendo la continuidad de la serie par.</text:p>
      <text:h text:style-name="P3" text:outline-level="4">5. Resultados</text:h>
      <text:p text:style-name="P4">Presentar la tabla depurada que has estado construyendo.</text:p>
      <text:list text:style-name="L4">
        <text:list-item>
          <text:p text:style-name="P8"><text:soft-page-break/><text:span text:style-name="T2">Tabla de registros:</text:span><text:span text:style-name="T3"> Incluye tu columna </text:span><text:span text:style-name="Source_20_Text"><text:span text:style-name="T3">filtro_final</text:span></text:span><text:span text:style-name="T3"> como la medida principal de rendimiento del número.</text:span></text:p>
        </text:list-item>
        <text:list-item>
          <text:p text:style-name="P9"><text:span text:style-name="T1">Observación clave:</text:span> Destaca que mientras que la secuencia de Jacobsthal general produce números, <text:span text:style-name="T1">tu filtro es el selector</text:span> que garantiza la propiedad de cobertura total.</text:p>
        </text:list-item>
      </text:list>
      <text:h text:style-name="P3" text:outline-level="4">6. Discusión: Hacia una teoría de la "Cobertura Binaria"</text:h>
      <text:list text:style-name="L5">
        <text:list-item>
          <text:p text:style-name="P10">¿Por qué el crecimiento es $2|n$ o $4|n$?</text:p>
        </text:list-item>
        <text:list-item>
          <text:p text:style-name="P10">La distinción entre números que empiezan en 2 (tipo 2) y números que empiezan en 4 (tipo 4) sugiere que existen dos "fases" de crecimiento en la estructura binaria.</text:p>
        </text:list-item>
        <text:list-item>
          <text:p text:style-name="P10">Discusión sobre la eficiencia: ¿Es posible cubrir el rango de pares con menos bits? (Tu lista sugiere que estos números son el mínimo necesario para lograr esa cobertura).</text:p>
        </text:list-item>
      </text:list>
      <text:p text:style-name="Text_20_body">numero<text:tab/>binario<text:tab/>posiciones<text:tab/>sumas<text:tab/>filtro_final 1<text:tab/>1<text:tab/>[1]<text:tab/>[2]<text:tab/>[2]:(2|1) 3<text:tab/>11 [2 1]<text:tab/>[2 3 4]<text:tab/>[2 4]:(2|2) 5<text:tab/>101<text:tab/>[3 1]<text:tab/>[2 4 6]<text:tab/>[2 4 6]:(2|3) 11<text:tab/>1011<text:tab/>[4 2 1]<text:tab/>[2 3 4 5 6 8]<text:tab/>[2 4 6 8]:(2|4) 21<text:tab/>10101<text:tab/>[5 3 1]<text:tab/>[2 4 6 8 10]<text:tab/>[2 4 6 8 10]:(2|5) 43<text:tab/>101011 [6 4 2 1]<text:tab/>[2 3 4 5 6 7 8 10 12]<text:tab/>[2 4 6 8 10 12]:(2|6) 83<text:tab/>1010011<text:tab/>[7 5 2 1] [2 3 4 6 7 8 9 10 12 14]<text:tab/>[2 4 6 8 10 12 14]:(2|7) 167<text:tab/>10100111<text:tab/>[8 6 3 2 1]<text:tab/>[2 3 4 5 6 7 8 9 10 11 12 14 16]<text:tab/>[2 4 6 8 10 12 14 16]:(2|8) 325<text:tab/>101000101<text:tab/>[9 7 3 1]<text:tab/>[2 4 6 8 10 12 14 16 18]<text:tab/>[2 4 6 8 10 12 14 16 18]:(2|9) 651<text:tab/>1010001011<text:tab/>[10 8 4 2 1]<text:tab/>[2 3 4 5 6 8 9 10 11 12 14 16 18 20]<text:tab/>[2 4 6 8 10 12 14 16 18 20]:(2|10) 1301<text:tab/>10100010101<text:tab/>[11 9 5 3 1] [2 4 6 8 10 12 14 16 18 20 22]<text:tab/>[2 4 6 8 10 12 14 16 18 20 22]:(2|11) 2603 101000101011<text:tab/>[12 10 6 4 2 1]<text:tab/>[2 3 4 5 6 7 8 10 11 12 13 14 16 18 20 22 24] [2 4 6 8 10 12 14 16 18 20 22 24]:(2|12) 5189<text:tab/>1010001000101<text:tab/>[13 11 7 3 1]<text:tab/>[2 4 6 8 10 12 14 16 18 20 22 24 26]<text:tab/>[2 4 6 8 10 12 14 16 18 20 22 24 26]:(2|13) 10379 10100010001011<text:tab/>[14 12 8 4 2 1]<text:tab/>[2 3 4 5 6 8 9 10 12 13 14 15 16 18 20 22 24 26 28]<text:tab/>[2 4 6 8 10 12 14 16 18 20 22 24 26 28]:(2|14) 20757<text:tab/>101000100010101<text:tab/>[15 13 9 5 3 1]<text:tab/>[2 4 6 8 10 12 14 16 18 20 22 24 26 28 30]<text:tab/>[2 4 6 8 10 12 14 16 18 20 22 24 26 28 30]:(2|15) 41515<text:tab/>1010001000101011<text:tab/>[16 14 10 6 4 2 1]<text:tab/>[2 3 4 5 6 7 8 10 11 12 14 15 16 17 18 20 22 24 26 28 30 32]<text:tab/>[2 4 6 8 10 12 14 16 18 20 22 24 26 28 30 32]:(2|16) 83013 10100010001000101<text:tab/>[17 15 11 7 3 1]<text:tab/>[2 4 6 8 10 12 14 16 18 20 22 24 26 28 30 32 34]<text:tab/>[2 4 6 8 10 12 14 16 18 20 22 24 26 28 30 32 34]:(2|17) 166027<text:tab/>101000100010001011 [18 16 12 8 4 2 1]<text:tab/>[2 3 4 5 6 8 9 10 12 13 14 16 17 18 19 20 22 24 26 28 30 32 34 36] [2 4 6 8 10 12 14 16 18 20 22 24 26 28 30 32 34 36]:(2|18) 332053 1010001000100010101<text:tab/>[19 17 13 9 5 3 1]<text:tab/>[2 4 6 8 10 12 14 16 18 20 22 24 26 28 30 32 34 36 38]<text:tab/>[2 4 6 8 10 12 14 16 18 20 22 24 26 28 30 32 34 36 38]:(2|19) 664107 10100010001000101011<text:tab/>[20 18 14 10 6 4 2 1]<text:tab/>[2 3 4 5 6 7 8 10 11 12 14 15 16 18 19 20 21 22 24 26 28 30 32 34 36 38 40]<text:tab/>[2 4 6 8 10 12 14 16 18 20 22 24 26 28 30 32 34 36 38 40]:(2|20)</text:p>
      <text:p text:style-name="Text_20_body"/>
      <text:p text:style-name="Text_20_body">numero<text:tab/>binario<text:tab/>posiciones<text:tab/>sumas<text:tab/>filtro_final 2<text:tab/>10<text:tab/>[2]<text:tab/>[4]<text:tab/>[4]:(4|1) 6<text:tab/>110 [3 2]<text:tab/>[4 5 6]<text:tab/>[4 6]:(4|2) 10<text:tab/>1010<text:tab/>[4 2]<text:tab/>[4 6 8]<text:tab/>[4 6 8]:(4|3) 22<text:tab/>10110<text:tab/>[5 3 2]<text:tab/>[4 5 6 7 8 10]<text:tab/>[4 6 8 10]:(4|4) 42<text:tab/>101010<text:tab/>[6 4 2]<text:tab/>[4 6 8 10 12]<text:tab/>[4 6 8 10 12]:(4|5) 86 1010110<text:tab/>[7 5 3 2]<text:tab/>[4 5 6 7 8 9 10 12 14]<text:tab/>[4 6 8 10 12 14]:(4|6) 166<text:tab/>10100110 [8 6 3 2]<text:tab/>[4 5 6 8 9 10 11 12 14 16]<text:tab/>[4 6 8 10 12 14 16]:(4|7) 334<text:tab/>101001110<text:tab/>[9 7 4 3 2]<text:tab/>[4 5 6 7 8 9 10 11 <text:soft-page-break/>12 13 14 16 18]<text:tab/>[4 6 8 10 12 14 16 18]:(4|8) 650<text:tab/>1010001010<text:tab/>[10 8 4 2]<text:tab/>[4 6 8 10 12 14 16 18 20]<text:tab/>[4 6 8 10 12 14 16 18 20]:(4|9) 1302<text:tab/>10100010110<text:tab/>[11 9 5 3 2] [4 5 6 7 8 10 11 12 13 14 16 18 20 22]<text:tab/>[4 6 8 10 12 14 16 18 20 22]:(4|10) 2602<text:tab/>101000101010<text:tab/>[12 10 6 4 2]<text:tab/>[4 6 8 10 12 14 16 18 20 22 24]<text:tab/>[4 6 8 10 12 14 16 18 20 22 24]:(4|11) 5206<text:tab/>1010001010110<text:tab/>[13 11 7 5 3 2]<text:tab/>[4 5 6 7 8 9 10 12 13 14 15 16 18 20 22 24 26]<text:tab/>[4 6 8 10 12 14 16 18 20 22 24 26]:(4|12) 10378<text:tab/>10100010001010<text:tab/>[14 12 8 4 2]<text:tab/>[4 6 8 10 12 14 16 18 20 22 24 26 28]<text:tab/>[4 6 8 10 12 14 16 18 20 22 24 26 28]:(4|13) 20758<text:tab/>101000100010110<text:tab/>[15 13 9 5 3 2]<text:tab/>[4 5 6 7 8 10 11 12 14 15 16 17 18 20 22 24 26 28 30]<text:tab/>[4 6 8 10 12 14 16 18 20 22 24 26 28 30]:(4|14) 41514<text:tab/>1010001000101010<text:tab/>[16 14 10 6 4 2]<text:tab/>[4 6 8 10 12 14 16 18 20 22 24 26 28 30 32]<text:tab/>[4 6 8 10 12 14 16 18 20 22 24 26 28 30 32]:(4|15) 83030<text:tab/>10100010001010110<text:tab/>[17 15 11 7 5 3 2]<text:tab/>[4 5 6 7 8 9 10 12 13 14 16 17 18 19 20 22 24 26 28 30 32 34]<text:tab/>[4 6 8 10 12 14 16 18 20 22 24 26 28 30 32 34]:(4|16) 166026<text:tab/>101000100010001010<text:tab/>[18 16 12 8 4 2]<text:tab/>[4 6 8 10 12 14 16 18 20 22 24 26 28 30 32 34 36]<text:tab/>[4 6 8 10 12 14 16 18 20 22 24 26 28 30 32 34 36]:(4|17) 332054<text:tab/>1010001000100010110<text:tab/>[19 17 13 9 5 3 2]<text:tab/>[4 5 6 7 8 10 11 12 14 15 16 18 19 20 21 22 24 26 28 30 32 34 36 38]<text:tab/>[4 6 8 10 12 14 16 18 20 22 24 26 28 30 32 34 36 38]:(4|18) 664106<text:tab/>10100010001000101010<text:tab/>[20 18 14 10 6 4 2]<text:tab/>[4 6 8 10 12 14 16 18 20 22 24 26 28 30 32 34 36 38 40]<text:tab/>[4 6 8 10 12 14 16 18 20 22 24 26 28 30 32 34 36 38 40]:(4|19)</text:p>
      <text:p text:style-name="Text_20_body"/>
      <text:p text:style-name="Text_20_body">numero<text:tab/>binario<text:tab/>posiciones<text:tab/>sumas<text:tab/>filtro_final 1<text:tab/>1<text:tab/>[1]<text:tab/>[2]<text:tab/>[2]:(2|1) 2<text:tab/>10<text:tab/>[2]<text:tab/>[4]<text:tab/>[4]:(4|1) 3<text:tab/>11<text:tab/>[2 1]<text:tab/>[2 3 4]<text:tab/>[2 4]:(2|2) 5<text:tab/>101<text:tab/>[3 1]<text:tab/>[2 4 6]<text:tab/>[2 4 6]:(2|3) 6<text:tab/>110<text:tab/>[3 2]<text:tab/>[4 5 6]<text:tab/>[4 6]:(4|2) 7<text:tab/>111<text:tab/>[3 2 1]<text:tab/>[2 3 4 5 6]<text:tab/>[2 4 6]:(2|3) 10<text:tab/>1010<text:tab/>[4 2]<text:tab/>[4 6 8]<text:tab/>[4 6 8]:(4|3) 11<text:tab/>1011<text:tab/>[4 2 1]<text:tab/>[2 3 4 5 6 8]<text:tab/>[2 4 6 8]:(2|4) 13<text:tab/>1101<text:tab/>[4 3 1]<text:tab/>[2 4 5 6 7 8]<text:tab/>[2 4 6 8]:(2|4) 14<text:tab/>1110<text:tab/>[4 3 2]<text:tab/>[4 5 6 7 8]<text:tab/>[4 6 8]:(4|3) 15<text:tab/>1111<text:tab/>[4 3 2 1]<text:tab/>[2 3 4 5 6 7 8]<text:tab/>[2 4 6 8]:(2|4) 21<text:tab/>10101<text:tab/>[5 3 1]<text:tab/>[2 4 6 8 10]<text:tab/>[2 4 6 8 10]:(2|5) 22<text:tab/>10110<text:tab/>[5 3 2]<text:tab/>[4 5 6 7 8 10]<text:tab/>[4 6 8 10]:(4|4) 23<text:tab/>10111<text:tab/>[5 3 2 1]<text:tab/>[2 3 4 5 6 7 8 10]<text:tab/>[2 4 6 8 10]:(2|5) 26<text:tab/>11010<text:tab/>[5 4 2]<text:tab/>[4 6 7 8 9 10]<text:tab/>[4 6 8 10]:(4|4) 27<text:tab/>11011<text:tab/>[5 4 2 1]<text:tab/>[2 3 4 5 6 7 8 9 10]<text:tab/>[2 4 6 8 10]:(2|5) 29<text:tab/>11101<text:tab/>[5 4 3 1]<text:tab/>[2 4 5 6 7 8 9 10]<text:tab/>[2 4 6 8 10]:(2|5) 30<text:tab/>11110<text:tab/>[5 4 3 2]<text:tab/>[4 5 6 7 8 9 10]<text:tab/>[4 6 8 10]:(4|4) 31<text:tab/>11111<text:tab/>[5 4 3 2 1]<text:tab/>[2 3 4 5 6 7 8 9 10]<text:tab/>[2 4 6 8 10]:(2|5) 42<text:tab/>101010<text:tab/>[6 4 2]<text:tab/>[4 6 8 10 12]<text:tab/>[4 6 8 10 12]:(4|5) 43<text:tab/>101011<text:tab/>[6 4 2 1]<text:tab/>[2 3 4 5 6 7 8 10 12]<text:tab/>[2 4 6 8 10 12]:(2|6) 45<text:tab/>101101<text:tab/>[6 4 3 1]<text:tab/>[2 4 5 6 7 8 9 10 12]<text:tab/>[2 4 6 8 10 12]:(2|6) 46<text:tab/>101110<text:tab/>[6 4 3 2]<text:tab/>[4 5 6 7 8 9 10 12]<text:tab/>[4 6 8 10 12]:(4|5) 47<text:tab/>101111<text:tab/>[6 4 3 2 1]<text:tab/>[2 3 4 5 6 7 8 9 10 12]<text:tab/>[2 4 6 8 10 12]:(2|6) 51<text:tab/>110011<text:tab/>[6 5 2 1]<text:tab/>[2 3 4 6 7 8 10 11 12]<text:tab/>[2 4 6 8 10 12]:(2|6) 53<text:tab/>110101<text:tab/>[6 5 3 1]<text:tab/>[2 4 6 7 8 9 10 11 12]<text:tab/>[2 4 6 8 10 12]:(2|6) 54<text:tab/>110110<text:tab/>[6 5 3 2]<text:tab/>[4 5 6 7 8 9 10 11 12]<text:tab/>[4 6 8 10 12]:(4|5) 55<text:tab/>110111<text:tab/>[6 5 3 2 1]<text:tab/>[2 3 4 5 6 7 8 9 10 11 12]<text:tab/>[2 4 6 8 10 12]:(2|6) 58<text:tab/>111010<text:tab/>[6 5 4 2]<text:tab/>[4 6 7 8 9 10 11 12]<text:tab/>[4 6 8 10 12]:(4|5) 59<text:tab/>111011<text:tab/>[6 5 4 2 1]<text:tab/>[2 3 4 5 6 7 8 9 10 11 12]<text:tab/>[2 4 6 8 10 12]:(2|6) 61<text:tab/>111101<text:tab/>[6 5 4 3 1]<text:tab/>[2 4 5 6 7 8 9 10 11 12]<text:tab/>[2 4 6 8 10 12]:(2|6) 62<text:tab/>111110<text:tab/>[6 5 4 3 2]<text:tab/>[4 5 6 7 8 9 10 11 12]<text:tab/>[4 6 8 10 12]:(4|5) 63<text:tab/>111111<text:tab/>[6 5 4 3 2 1]<text:tab/>[2 3 4 5 6 7 8 9 10 11 12]<text:tab/>[2 4 6 8 10 12]:(2|6) 83<text:tab/>1010011<text:tab/>[7 5 2 1]<text:tab/>[2 3 4 6 7 8 9 10 12 14]<text:tab/>[2 4 6 8 10 12 14]:(2|7) 85<text:tab/>1010101<text:tab/>[7 5 3 1]<text:tab/>[2 4 6 8 10 12 14]<text:tab/>[2 4 6 8 10 12 14]:(2|7) 86<text:tab/>1010110<text:tab/>[7 5 3 2]<text:tab/>[4 5 6 7 8 9 10 12 14]<text:tab/>[4 6 8 10 12 14]:(4|6) 87<text:tab/>1010111<text:tab/>[7 5 3 2 1]<text:tab/>[2 3 4 5 6 7 8 9 10 12 14]<text:tab/>[2 4 6 8 10 12 14]:(2|7) 90<text:tab/>1011010<text:tab/>[7 5 4 2]<text:tab/>[4 6 7 8 9 10 11 12 14]<text:tab/>[4 6 8 10 12 14]:(4|6) 91<text:tab/>1011011<text:tab/>[7 5 4 2 1]<text:tab/>[2 3 4 5 6 7 8 9 10 <text:soft-page-break/>11 12 14]<text:tab/>[2 4 6 8 10 12 14]:(2|7) 93<text:tab/>1011101<text:tab/>[7 5 4 3 1]<text:tab/>[2 4 5 6 7 8 9 10 11 12 14]<text:tab/>[2 4 6 8 10 12 14]:(2|7) 94<text:tab/>1011110<text:tab/>[7 5 4 3 2]<text:tab/>[4 5 6 7 8 9 10 11 12 14]<text:tab/>[4 6 8 10 12 14]:(4|6) 95<text:tab/>1011111<text:tab/>[7 5 4 3 2 1]<text:tab/>[2 3 4 5 6 7 8 9 10 11 12 14]<text:tab/>[2 4 6 8 10 12 14]:(2|7) 101<text:tab/>1100101<text:tab/>[7 6 3 1]<text:tab/>[2 4 6 7 8 9 10 12 13 14]<text:tab/>[2 4 6 8 10 12 14]:(2|7) 102<text:tab/>1100110<text:tab/>[7 6 3 2]<text:tab/>[4 5 6 8 9 10 12 13 14]<text:tab/>[4 6 8 10 12 14]:(4|6) 103<text:tab/>1100111<text:tab/>[7 6 3 2 1]<text:tab/>[2 3 4 5 6 7 8 9 10 12 13 14]<text:tab/>[2 4 6 8 10 12 14]:(2|7) 106<text:tab/>1101010<text:tab/>[7 6 4 2]<text:tab/>[4 6 8 9 10 11 12 13 14]<text:tab/>[4 6 8 10 12 14]:(4|6) 107<text:tab/>1101011<text:tab/>[7 6 4 2 1]<text:tab/>[2 3 4 5 6 7 8 9 10 11 12 13 14]<text:tab/>[2 4 6 8 10 12 14]:(2|7) 109<text:tab/>1101101<text:tab/>[7 6 4 3 1]<text:tab/>[2 4 5 6 7 8 9 10 11 12 13 14]<text:tab/>[2 4 6 8 10 12 14]:(2|7) 110<text:tab/>1101110<text:tab/>[7 6 4 3 2]<text:tab/>[4 5 6 7 8 9 10 11 12 13 14]<text:tab/>[4 6 8 10 12 14]:(4|6) 111<text:tab/>1101111<text:tab/>[7 6 4 3 2 1]<text:tab/>[2 3 4 5 6 7 8 9 10 11 12 13 14]<text:tab/>[2 4 6 8 10 12 14]:(2|7) 115<text:tab/>1110011<text:tab/>[7 6 5 2 1]<text:tab/>[2 3 4 6 7 8 9 10 11 12 13 14]<text:tab/>[2 4 6 8 10 12 14]:(2|7) 117<text:tab/>1110101<text:tab/>[7 6 5 3 1]<text:tab/>[2 4 6 7 8 9 10 11 12 13 14]<text:tab/>[2 4 6 8 10 12 14]:(2|7) 118<text:tab/>1110110<text:tab/>[7 6 5 3 2]<text:tab/>[4 5 6 7 8 9 10 11 12 13 14]<text:tab/>[4 6 8 10 12 14]:(4|6) 119<text:tab/>1110111<text:tab/>[7 6 5 3 2 1]<text:tab/>[2 3 4 5 6 7 8 9 10 11 12 13 14]<text:tab/>[2 4 6 8 10 12 14]:(2|7) 122<text:tab/>1111010<text:tab/>[7 6 5 4 2]<text:tab/>[4 6 7 8 9 10 11 12 13 14]<text:tab/>[4 6 8 10 12 14]:(4|6) 123<text:tab/>1111011<text:tab/>[7 6 5 4 2 1]<text:tab/>[2 3 4 5 6 7 8 9 10 11 12 13 14]<text:tab/>[2 4 6 8 10 12 14]:(2|7) 125<text:tab/>1111101<text:tab/>[7 6 5 4 3 1]<text:tab/>[2 4 5 6 7 8 9 10 11 12 13 14]<text:tab/>[2 4 6 8 10 12 14]:(2|7) 126<text:tab/>1111110<text:tab/>[7 6 5 4 3 2]<text:tab/>[4 5 6 7 8 9 10 11 12 13 14]<text:tab/>[4 6 8 10 12 14]:(4|6) 127<text:tab/>1111111<text:tab/>[7 6 5 4 3 2 1]<text:tab/>[2 3 4 5 6 7 8 9 10 11 12 13 14]<text:tab/>[2 4 6 8 10 12 14]:(2|7) 166<text:tab/>10100110<text:tab/>[8 6 3 2]<text:tab/>[4 5 6 8 9 10 11 12 14 16]<text:tab/>[4 6 8 10 12 14 16]:(4|7) 167<text:tab/>10100111<text:tab/>[8 6 3 2 1]<text:tab/>[2 3 4 5 6 7 8 9 10 11 12 14 16]<text:tab/>[2 4 6 8 10 12 14 16]:(2|8) 170<text:tab/>10101010<text:tab/>[8 6 4 2]<text:tab/>[4 6 8 10 12 14 16]<text:tab/>[4 6 8 10 12 14 16]:(4|7) 171<text:tab/>10101011<text:tab/>[8 6 4 2 1]<text:tab/>[2 3 4 5 6 7 8 9 10 12 14 16]<text:tab/>[2 4 6 8 10 12 14 16]:(2|8) 173<text:tab/>10101101<text:tab/>[8 6 4 3 1]<text:tab/>[2 4 5 6 7 8 9 10 11 12 14 16]<text:tab/>[2 4 6 8 10 12 14 16]:(2|8) 174<text:tab/>10101110<text:tab/>[8 6 4 3 2]<text:tab/>[4 5 6 7 8 9 10 11 12 14 16]<text:tab/>[4 6 8 10 12 14 16]:(4|7) 175<text:tab/>10101111<text:tab/>[8 6 4 3 2 1]<text:tab/>[2 3 4 5 6 7 8 9 10 11 12 14 16]<text:tab/>[2 4 6 8 10 12 14 16]:(2|8) 179<text:tab/>10110011<text:tab/>[8 6 5 2 1]<text:tab/>[2 3 4 6 7 8 9 10 11 12 13 14 16]<text:tab/>[2 4 6 8 10 12 14 16]:(2|8) 181<text:tab/>10110101<text:tab/>[8 6 5 3 1]<text:tab/>[2 4 6 7 8 9 10 11 12 13 14 16]<text:tab/>[2 4 6 8 10 12 14 16]:(2|8) 182<text:tab/>10110110<text:tab/>[8 6 5 3 2]<text:tab/>[4 5 6 7 8 9 10 11 12 13 14 16]<text:tab/>[4 6 8 10 12 14 16]:(4|7) 183<text:tab/>10110111<text:tab/>[8 6 5 3 2 1]<text:tab/>[2 3 4 5 6 7 8 9 10 11 12 13 14 16]<text:tab/>[2 4 6 8 10 12 14 16]:(2|8) 186<text:tab/>10111010<text:tab/>[8 6 5 4 2]<text:tab/>[4 6 7 8 9 10 11 12 13 14 16]<text:tab/>[4 6 8 10 12 14 16]:(4|7) 187<text:tab/>10111011<text:tab/>[8 6 5 4 2 1]<text:tab/>[2 3 4 5 6 7 8 9 10 11 12 13 14 16]<text:tab/>[2 4 6 8 10 12 14 16]:(2|8) 189<text:tab/>10111101<text:tab/>[8 6 5 4 3 1]<text:tab/>[2 4 5 6 7 8 9 10 11 12 13 14 16]<text:tab/>[2 4 6 8 10 12 14 16]:(2|8) 190<text:tab/>10111110<text:tab/>[8 6 5 4 3 2]<text:tab/>[4 5 6 7 8 9 10 11 12 13 14 16]<text:tab/>[4 6 8 10 12 14 16]:(4|7) 191<text:tab/>10111111<text:tab/>[8 6 5 4 3 2 1]<text:tab/>[2 3 4 5 6 7 8 9 10 11 12 13 14 16]<text:tab/>[2 4 6 8 10 12 14 16]:(2|8) 202<text:tab/>11001010<text:tab/>[8 7 4 2]<text:tab/>[4 6 8 9 10 11 12 14 15 16]<text:tab/>[4 6 8 10 12 14 16]:(4|7) 203<text:tab/>11001011<text:tab/>[8 7 4 2 1]<text:tab/>[2 3 4 5 6 8 9 10 11 12 14 15 16]<text:tab/>[2 4 6 8 10 12 14 16]:(2|8) 205<text:tab/>11001101<text:tab/>[8 7 4 3 1]<text:tab/>[2 4 5 6 7 8 9 10 11 12 14 15 16]<text:tab/>[2 4 6 8 10 12 14 16]:(2|8) 206<text:tab/>11001110<text:tab/>[8 7 4 3 2]<text:tab/>[4 5 6 7 8 9 10 11 12 14 15 16]<text:tab/>[4 6 8 10 12 14 16]:(4|7) 207<text:tab/>11001111<text:tab/>[8 7 4 3 2 1]<text:tab/>[2 3 4 5 6 7 8 9 10 11 12 14 15 16]<text:tab/>[2 4 6 8 10 12 14 16]:(2|8) 211<text:tab/>11010011<text:tab/>[8 7 5 2 1]<text:tab/>[2 3 4 6 7 8 9 10 12 13 14 15 16]<text:tab/>[2 4 6 8 10 12 14 16]:(2|8) 213<text:tab/>11010101<text:tab/>[8 7 5 3 1]<text:tab/>[2 4 6 8 9 10 11 12 13 14 15 16]<text:tab/>[2 4 6 8 10 12 14 16]:(2|8) 214<text:tab/>11010110<text:tab/>[8 7 5 3 2]<text:tab/>[4 5 6 7 8 9 10 11 12 13 14 15 16]<text:tab/>[4 6 8 10 12 14 16]:(4|7) 215<text:tab/>11010111<text:tab/>[8 7 5 3 2 1]<text:tab/>[2 3 4 5 6 7 8 9 10 11 12 13 14 15 16]<text:tab/>[2 4 6 8 10 12 14 16]:(2|8) 218<text:tab/>11011010<text:tab/>[8 7 5 4 2]<text:tab/>[4 6 7 8 9 10 11 12 13 14 15 16]<text:tab/>[4 6 8 10 12 14 <text:soft-page-break/>16]:(4|7) 219<text:tab/>11011011<text:tab/>[8 7 5 4 2 1]<text:tab/>[2 3 4 5 6 7 8 9 10 11 12 13 14 15 16]<text:tab/>[2 4 6 8 10 12 14 16]:(2|8) 221<text:tab/>11011101<text:tab/>[8 7 5 4 3 1]<text:tab/>[2 4 5 6 7 8 9 10 11 12 13 14 15 16]<text:tab/>[2 4 6 8 10 12 14 16]:(2|8) 222<text:tab/>11011110<text:tab/>[8 7 5 4 3 2]<text:tab/>[4 5 6 7 8 9 10 11 12 13 14 15 16]<text:tab/>[4 6 8 10 12 14 16]:(4|7) 223<text:tab/>11011111<text:tab/>[8 7 5 4 3 2 1]<text:tab/>[2 3 4 5 6 7 8 9 10 11 12 13 14 15 16]<text:tab/>[2 4 6 8 10 12 14 16]:(2|8) 229<text:tab/>11100101<text:tab/>[8 7 6 3 1]<text:tab/>[2 4 6 7 8 9 10 11 12 13 14 15 16]<text:tab/>[2 4 6 8 10 12 14 16]:(2|8) 230<text:tab/>11100110<text:tab/>[8 7 6 3 2]<text:tab/>[4 5 6 8 9 10 11 12 13 14 15 16]<text:tab/>[4 6 8 10 12 14 16]:(4|7) 231<text:tab/>11100111<text:tab/>[8 7 6 3 2 1]<text:tab/>[2 3 4 5 6 7 8 9 10 11 12 13 14 15 16]<text:tab/>[2 4 6 8 10 12 14 16]:(2|8) 234<text:tab/>11101010<text:tab/>[8 7 6 4 2]<text:tab/>[4 6 8 9 10 11 12 13 14 15 16]<text:tab/>[4 6 8 10 12 14 16]:(4|7) 235<text:tab/>11101011<text:tab/>[8 7 6 4 2 1]<text:tab/>[2 3 4 5 6 7 8 9 10 11 12 13 14 15 16]<text:tab/>[2 4 6 8 10 12 14 16]:(2|8) 237<text:tab/>11101101<text:tab/>[8 7 6 4 3 1]<text:tab/>[2 4 5 6 7 8 9 10 11 12 13 14 15 16]<text:tab/>[2 4 6 8 10 12 14 16]:(2|8) 238<text:tab/>11101110<text:tab/>[8 7 6 4 3 2]<text:tab/>[4 5 6 7 8 9 10 11 12 13 14 15 16]<text:tab/>[4 6 8 10 12 14 16]:(4|7) 239<text:tab/>11101111<text:tab/>[8 7 6 4 3 2 1]<text:tab/>[2 3 4 5 6 7 8 9 10 11 12 13 14 15 16]<text:tab/>[2 4 6 8 10 12 14 16]:(2|8) 243<text:tab/>11110011<text:tab/>[8 7 6 5 2 1]<text:tab/>[2 3 4 6 7 8 9 10 11 12 13 14 15 16]<text:tab/>[2 4 6 8 10 12 14 16]:(2|8) 245<text:tab/>11110101<text:tab/>[8 7 6 5 3 1]<text:tab/>[2 4 6 7 8 9 10 11 12 13 14 15 16]<text:tab/>[2 4 6 8 10 12 14 16]:(2|8) 246<text:tab/>11110110<text:tab/>[8 7 6 5 3 2]<text:tab/>[4 5 6 7 8 9 10 11 12 13 14 15 16]<text:tab/>[4 6 8 10 12 14 16]:(4|7) 247<text:tab/>11110111<text:tab/>[8 7 6 5 3 2 1]<text:tab/>[2 3 4 5 6 7 8 9 10 11 12 13 14 15 16]<text:tab/>[2 4 6 8 10 12 14 16]:(2|8) 250<text:tab/>11111010<text:tab/>[8 7 6 5 4 2]<text:tab/>[4 6 7 8 9 10 11 12 13 14 15 16]<text:tab/>[4 6 8 10 12 14 16]:(4|7) 251<text:tab/>11111011<text:tab/>[8 7 6 5 4 2 1]<text:tab/>[2 3 4 5 6 7 8 9 10 11 12 13 14 15 16]<text:tab/>[2 4 6 8 10 12 14 16]:(2|8) 253<text:tab/>11111101<text:tab/>[8 7 6 5 4 3 1]<text:tab/>[2 4 5 6 7 8 9 10 11 12 13 14 15 16]<text:tab/>[2 4 6 8 10 12 14 16]:(2|8) 254<text:tab/>11111110<text:tab/>[8 7 6 5 4 3 2]<text:tab/>[4 5 6 7 8 9 10 11 12 13 14 15 16]<text:tab/>[4 6 8 10 12 14 16]:(4|7) 255<text:tab/>11111111<text:tab/>[8 7 6 5 4 3 2 1]<text:tab/>[2 3 4 5 6 7 8 9 10 11 12 13 14 15 16]<text:tab/>[2 4 6 8 10 12 14 16]:(2|8)</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1T03:03:41.137690500</meta:creation-date>
    <dc:date>2026-06-01T03:09:52.548301300</dc:date>
    <meta:editing-duration>PT6M11S</meta:editing-duration>
    <meta:editing-cycles>2</meta:editing-cycles>
    <meta:generator>LibreOffice/26.2.3.2$Windows_X86_64 LibreOffice_project/70e089b17412e4cb7773e41413306b17a2328c34</meta:generator>
    <meta:document-statistic meta:table-count="0" meta:image-count="0" meta:object-count="0" meta:page-count="5" meta:paragraph-count="28" meta:word-count="4139" meta:character-count="14588" meta:non-whitespace-character-count="10489"/>
  </office:meta>
</office:document-meta>
</file>