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402cm"/>
    </style:style>
    <style:style style:name="Tabla1.B" style:family="table-column">
      <style:table-column-properties style:column-width="3.288cm"/>
    </style:style>
    <style:style style:name="Tabla1.C" style:family="table-column">
      <style:table-column-properties style:column-width="4.939cm"/>
    </style:style>
    <style:style style:name="Tabla1.D" style:family="table-column">
      <style:table-column-properties style:column-width="6.371cm"/>
    </style:style>
    <style:style style:name="Tabla1.A1" style:family="table-cell">
      <style:table-cell-properties style:vertical-align="middle" fo:padding-left="0.318cm" fo:padding-right="0.318cm" fo:padding-top="0.212cm" fo:padding-bottom="0.212cm" fo:border="0.05pt solid #c4c7c5"/>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5" style:family="paragraph" style:parent-style-name="Text_20_body">
      <style:paragraph-properties fo:margin-left="0cm" fo:margin-right="0cm" fo:margin-top="0cm" fo:margin-bottom="0.247cm" style:contextual-spacing="false" fo:line-height="114%" fo:text-indent="0cm" style:auto-text-indent="false"/>
    </style:style>
    <style:style style:name="P6" style:family="paragraph" style:parent-style-name="Table_20_Contents">
      <style:paragraph-properties fo:margin-left="0cm" fo:margin-right="0cm" fo:margin-top="0cm" fo:margin-bottom="0cm" style:contextual-spacing="false" fo:line-height="114%" fo:text-indent="0cm" style:auto-text-indent="false"/>
    </style:style>
    <style:style style:name="P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Standard">
      <style:text-properties style:text-underline-style="solid" style:text-underline-width="auto" style:text-underline-color="font-color"/>
    </style:style>
    <style:style style:name="P11" style:family="paragraph" style:parent-style-name="Text_20_body">
      <style:text-properties style:font-name="Google Sans Text" style:text-underline-style="solid" style:text-underline-width="auto" style:text-underline-color="font-color"/>
    </style:style>
    <style:style style:name="P12"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text-underline-style="solid" style:text-underline-width="auto" style:text-underline-color="font-color"/>
    </style:style>
    <style:style style:name="P13" style:family="paragraph" style:parent-style-name="Text_20_body" style:list-style-name="L3">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style:style>
    <style:style style:name="P15" style:family="paragraph" style:parent-style-name="Text_20_body" style:list-style-name="L4">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fo:font-weight="bold"/>
    </style:style>
    <style:style style:name="P16" style:family="paragraph" style:parent-style-name="Text_20_body" style:list-style-name="L5">
      <style:paragraph-properties fo:margin-left="0cm" fo:margin-right="0cm" fo:margin-top="0cm" fo:margin-bottom="0.247cm" style:contextual-spacing="false" fo:line-height="114%" fo:text-indent="0cm" style:auto-text-indent="false"/>
      <style:text-properties style:font-name="Google Sans Text" style:text-underline-style="solid" style:text-underline-width="auto" style:text-underline-color="font-color" fo:font-weight="bold"/>
    </style:style>
    <style:style style:name="P17" style:family="paragraph" style:parent-style-name="Standard">
      <style:text-properties style:text-underline-style="none"/>
    </style:style>
    <style:style style:name="T1" style:family="text">
      <style:text-properties fo:font-weight="bold"/>
    </style:style>
    <style:style style:name="T2" style:family="text">
      <style:text-properties officeooo:rsid="001d8aba"/>
    </style:style>
    <style:style style:name="T3" style:family="text">
      <style:text-properties style:font-name="Google Sans Text"/>
    </style:style>
    <style:style style:name="T4" style:family="text">
      <style:text-properties fo:font-style="italic"/>
    </style:style>
    <style:style style:name="T5" style:family="text">
      <style:text-properties style:text-underline-styl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bre una Constante de Bisección Angular Asintótica en Polígonos Inscritos: El Límite de Briceño-Gauss</text:h>
      <text:p text:style-name="P2"><text:span text:style-name="T1">Autor:</text:span> José Manuel Briceño Mendoza</text:p>
      <text:p text:style-name="P2"><text:span text:style-name="T1">Fecha:</text:span> Junio 2026 <text:span text:style-name="T2">06 09 yymmdd</text:span></text:p>
      <text:h text:style-name="P3" text:outline-level="3">Resumen</text:h>
      <text:p text:style-name="P2">En este manuscrito se formaliza el descubrimiento y la resolución analítica de una nueva constante geométrica trascendental de valor $A_{\infty} \approx 1.240524959667...$, obtenida al evaluar el área límite de una mallas poligonal irregular e hiper-densa inscrita en una circunferencia unitaria. A través de un proceso iterativo de bisección angular binaria hacia un punto de acumulación asintótico, se contrasta el comportamiento del algoritmo adaptativo de determinantes de Gauss (Shoelace) frente a una descomposición canónica por triangulación con vértice común. Se demuestra matemática y computacionalmente que el confinamiento espacial de infinitos vértices en la proximidad del eje de clausura provoca una pérdida de acoplamiento métrico con la curvatura ideal de la circunferencia, estabilizando el área en un límite cerrado e independiente de múltiplos directos de $\pi$.</text:p>
      <text:h text:style-name="P4" text:outline-level="2">1. Introducción y Fundamentos Geométricos</text:h>
      <text:p text:style-name="P2">La aproximación clásica de mallas bidimensionales para la discretización y cuadratura de cuerpos redondos —cuyos orígenes teóricos se remontan al método de exhausción de Antifonte y Arquímedes— asume una distribución angular uniforme de nodos a lo largo del contorno curvilíneo. Dicha simetría garantiza que la sumatoria de las áreas de los sub-elementos internos sature de forma homogénea el espacio cóncavo, convergiendo linealmente hacia el área del círculo teórico ($\pi R^2$).</text:p>
      <text:p text:style-name="P2">Este trabajo introduce un enfoque no convencional: la generación de una mallas poligonal asimétrica mediante la fijación de una base diametral ortogonal en una circunferencia de radio unitario ($R=1$), seguida de una secuencia infinita de subdivisiones angulares concentradas de forma asintótica en un único cuadrante. Este tipo de geometrías colapsantes impone un severo reto a los algoritmos de cálculo geométrico tradicional debido a la densidad de vectores en la cercanía del punto de acumulación. El propósito de este estudio es demostrar la existencia de la constante que rige dicha frontera, deducir su ecuación analítica y validar la correspondencia absoluta entre los métodos de cálculo numérico y formal.</text:p>
      <text:h text:style-name="P4" text:outline-level="2"><text:soft-page-break/>2. Modelado Matemático y Métodos de Cálculo</text:h>
      <text:h text:style-name="P3" text:outline-level="3">2.1. Algoritmo de Coordenadas Cerradas (Fórmula de los Cordones de Gauss)</text:h>
      <text:p text:style-name="P2">Para evaluar el comportamiento del polígono iteración por iteración en el plano cartesiano, se utiliza el Teorema de Gauss para el cálculo de áreas mediante determinantes de vértices ordenados sobre la frontera:</text:p>
      <text:p text:style-name="P2">$$A = \frac{1}{2} \left| \sum_{i=1}^{n} (x_i y_{i+1} - x_{i+1} y_i) \right|$$</text:p>
      <text:p text:style-name="P2">Mapeando las coordenadas en el plano mediante la transformación polar estándar $x = \cos(\theta)$ y $y = \sin(\theta)$, el algoritmo de bisección angular genera la secuencia de puntos bajo la siguiente regla iterativa de control:</text:p>
      <text:p text:style-name="P2">$$\theta_1 = 270^\circ, \quad \theta_n = \theta_{n-1} + \frac{360^\circ - \theta_{n-1}}{2} \quad \text{para } n \ge 2$$</text:p>
      <text:p text:style-name="P5"><text:span text:style-name="T3">Los puntos base complementarios fijos que cierran el polígono se sitúan en $0^\circ$ ($360^\circ$) y $180^\circ$. Al ejecutar computacionalmente este modelo utilizando variables de doble precisión (</text:span><text:span text:style-name="Source_20_Text"><text:span text:style-name="T3">float64</text:span></text:span><text:span text:style-name="T3">), el sistema exhibe un estancamiento absoluto del crecimiento del área a partir de la iteración 12, estabilizándose por debajo del umbral del error de máquina ($\epsilon_{\text{machine}} \approx 2.22 \times 10^{-16}$) en el valor constante:</text:span></text:p>
      <text:p text:style-name="P2">$$A_{\infty} \approx 1.240524959667...$$</text:p>
      <text:h text:style-name="P3" text:outline-level="3">2.2. Resolución Analítica por Serie de Diferenciales Trigonométricos</text:h>
      <text:p text:style-name="P2">La validación matemática del límite numérico se obtiene al reinterpretar el comportamiento de la mallas mediante su descomposición en un espacio angular complementario.</text:p>
      <text:p text:style-name="P2">Sea $A_0 = 1.0$ el área del triángulo inscrito inicial correspondiente a los vértices fundamentales en $180^\circ, 270^\circ$ y $0^\circ$. Se define la variable angular $\alpha_n$ como la distancia en radianes que separa al vértice generado en la iteración $n$ respecto al punto de acumulación final ($360^\circ \equiv 0^\circ$). Debido a la naturaleza de la bisección binaria, esta distancia decrece exponencialmente:</text:p>
      <text:p text:style-name="P2">$$\alpha_n = \frac{\pi}{2^{n+1}} \quad \text{para } n \ge 1$$</text:p>
      <text:p text:style-name="P2">El análisis de las cuerdas e incrementos de área demuestra que el diferencial neto $\Delta A_n$ aportado por cada nuevo nodo responde de forma directa a la interacción trigonométrica de los ángulos de apertura complementarios:</text:p>
      <text:p text:style-name="P2">$$\Delta A_n = \frac{1}{2} \left[ 2\sin(\alpha_n) - \sin(\alpha_{n-1}) \right]$$</text:p>
      <text:p text:style-name="P2">Por consiguiente, el área total del polígono en el infinito queda estrictamente definida por la siguiente serie infinita de términos positivos:</text:p>
      <text:p text:style-name="P2">$$A_{\infty} = 1.0 + \sum_{n=1}^{\infty} \frac{1}{2} \left[ 2\sin\left(\frac{\pi}{2^{n+1}}\right) - \sin\left(\frac{\pi}{2^n}\right) \right]$$</text:p>
      <text:p text:style-name="P2"><text:soft-page-break/>A medida que $n \to \infty$, el argumento trigonométrico decae hacia cero ($\alpha_n \to 0$). Al aplicar la aproximación lineal de Maclaurin para la función seno ($\sin(x) \approx x$), la expresión del límite del término general revela un comportamiento nulo:</text:p>
      <text:p text:style-name="P2">$$\text{Lím}_{n \to \infty} \Delta A_n = \frac{1}{2} \left[ 2\left(\frac{\pi}{2^{n+1}}\right) - \frac{\pi}{2^n} \right] = \frac{1}{2} \left[ \frac{\pi}{2^n} - \frac{\pi}{2^n} \right] = 0$$</text:p>
      <text:p text:style-name="P2">Este desvanecimiento infinitesimal de los sumandos garantiza una convergencia monótona y estrictamente acotada, lo que excluye cualquier posibilidad de divergencia y sella analíticamente el valor estacionario de Briceño-Gauss.</text:p>
      <text:h text:style-name="P4" text:outline-level="2">3. Verificación Algorítmica y Resultados</text:h>
      <text:p text:style-name="P2">Para garantizar la reproducibilidad del modelo físico-matemático, se desarrolló un script de contraste numérico en lenguaje Python 3. El programa ejecuta en paralelo la matriz de coordenadas cartesianas y la sumatoria abstracta de la serie deducida. Los resultados experimentales se exponen en la siguiente tabla:</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6"><text:span text:style-name="Strong_20_Emphasis"><text:span text:style-name="T3">Vértices (n)</text:span></text:span></text:p>
            </table:table-cell>
            <table:table-cell table:style-name="Tabla1.A1" office:value-type="string">
              <text:p text:style-name="P6"><text:span text:style-name="Strong_20_Emphasis"><text:span text:style-name="T3">Ángulo Nuevo (°)</text:span></text:span></text:p>
            </table:table-cell>
            <table:table-cell table:style-name="Tabla1.A1" office:value-type="string">
              <text:p text:style-name="P6"><text:span text:style-name="Strong_20_Emphasis"><text:span text:style-name="T3">Área Sección 2.1 (Gauss)</text:span></text:span></text:p>
            </table:table-cell>
            <table:table-cell table:style-name="Tabla1.A1" office:value-type="string">
              <text:p text:style-name="P6"><text:span text:style-name="Strong_20_Emphasis"><text:span text:style-name="T3">Área Sección 2.2 (Serie Analítica)</text:span></text:span></text:p>
            </table:table-cell>
          </table:table-row>
        </table:table-header-rows>
        <table:table-row>
          <table:table-cell table:style-name="Tabla1.A1" office:value-type="string">
            <text:p text:style-name="P7">3</text:p>
          </table:table-cell>
          <table:table-cell table:style-name="Tabla1.A1" office:value-type="string">
            <text:p text:style-name="P7">270.00</text:p>
          </table:table-cell>
          <table:table-cell table:style-name="Tabla1.A1" office:value-type="string">
            <text:p text:style-name="P7">1.000000000000</text:p>
          </table:table-cell>
          <table:table-cell table:style-name="Tabla1.A1" office:value-type="string">
            <text:p text:style-name="P7">1.000000000000</text:p>
          </table:table-cell>
        </table:table-row>
        <table:table-row>
          <table:table-cell table:style-name="Tabla1.A1" office:value-type="string">
            <text:p text:style-name="P7">4</text:p>
          </table:table-cell>
          <table:table-cell table:style-name="Tabla1.A1" office:value-type="string">
            <text:p text:style-name="P7">315.00</text:p>
          </table:table-cell>
          <table:table-cell table:style-name="Tabla1.A1" office:value-type="string">
            <text:p text:style-name="P7">1.207106781187</text:p>
          </table:table-cell>
          <table:table-cell table:style-name="Tabla1.A1" office:value-type="string">
            <text:p text:style-name="P7">1.207106781187</text:p>
          </table:table-cell>
        </table:table-row>
        <table:table-row>
          <table:table-cell table:style-name="Tabla1.A1" office:value-type="string">
            <text:p text:style-name="P7">5</text:p>
          </table:table-cell>
          <table:table-cell table:style-name="Tabla1.A1" office:value-type="string">
            <text:p text:style-name="P7">337.50</text:p>
          </table:table-cell>
          <table:table-cell table:style-name="Tabla1.A1" office:value-type="string">
            <text:p text:style-name="P7">1.236236822958</text:p>
          </table:table-cell>
          <table:table-cell table:style-name="Tabla1.A1" office:value-type="string">
            <text:p text:style-name="P7">1.236236822958</text:p>
          </table:table-cell>
        </table:table-row>
        <table:table-row>
          <table:table-cell table:style-name="Tabla1.A1" office:value-type="string">
            <text:p text:style-name="P7">6</text:p>
          </table:table-cell>
          <table:table-cell table:style-name="Tabla1.A1" office:value-type="string">
            <text:p text:style-name="P7">348.75</text:p>
          </table:table-cell>
          <table:table-cell table:style-name="Tabla1.A1" office:value-type="string">
            <text:p text:style-name="P7">1.239985428792</text:p>
          </table:table-cell>
          <table:table-cell table:style-name="Tabla1.A1" office:value-type="string">
            <text:p text:style-name="P7">1.239985428792</text:p>
          </table:table-cell>
        </table:table-row>
        <table:table-row>
          <table:table-cell table:style-name="Tabla1.A1" office:value-type="string">
            <text:p text:style-name="P7">7</text:p>
          </table:table-cell>
          <table:table-cell table:style-name="Tabla1.A1" office:value-type="string">
            <text:p text:style-name="P7">354.38</text:p>
          </table:table-cell>
          <table:table-cell table:style-name="Tabla1.A1" office:value-type="string">
            <text:p text:style-name="P7">1.240457408113</text:p>
          </table:table-cell>
          <table:table-cell table:style-name="Tabla1.A1" office:value-type="string">
            <text:p text:style-name="P7">1.240457408113</text:p>
          </table:table-cell>
        </table:table-row>
        <table:table-row>
          <table:table-cell table:style-name="Tabla1.A1" office:value-type="string">
            <text:p text:style-name="P7">8</text:p>
          </table:table-cell>
          <table:table-cell table:style-name="Tabla1.A1" office:value-type="string">
            <text:p text:style-name="P7">357.19</text:p>
          </table:table-cell>
          <table:table-cell table:style-name="Tabla1.A1" office:value-type="string">
            <text:p text:style-name="P7">1.240516512276</text:p>
          </table:table-cell>
          <table:table-cell table:style-name="Tabla1.A1" office:value-type="string">
            <text:p text:style-name="P7">1.240516512276</text:p>
          </table:table-cell>
        </table:table-row>
        <table:table-row>
          <table:table-cell table:style-name="Tabla1.A1" office:value-type="string">
            <text:p text:style-name="P7">9</text:p>
          </table:table-cell>
          <table:table-cell table:style-name="Tabla1.A1" office:value-type="string">
            <text:p text:style-name="P7">358.59</text:p>
          </table:table-cell>
          <table:table-cell table:style-name="Tabla1.A1" office:value-type="string">
            <text:p text:style-name="P7">1.240523903635</text:p>
          </table:table-cell>
          <table:table-cell table:style-name="Tabla1.A1" office:value-type="string">
            <text:p text:style-name="P7">1.240523903635</text:p>
          </table:table-cell>
        </table:table-row>
        <table:table-row>
          <table:table-cell table:style-name="Tabla1.A1" office:value-type="string">
            <text:p text:style-name="P7">...</text:p>
          </table:table-cell>
          <table:table-cell table:style-name="Tabla1.A1" office:value-type="string">
            <text:p text:style-name="P7">...</text:p>
          </table:table-cell>
          <table:table-cell table:style-name="Tabla1.A1" office:value-type="string">
            <text:p text:style-name="P7">...</text:p>
          </table:table-cell>
          <table:table-cell table:style-name="Tabla1.A1" office:value-type="string">
            <text:p text:style-name="P7">...</text:p>
          </table:table-cell>
        </table:table-row>
        <table:table-row>
          <table:table-cell table:style-name="Tabla1.A1" office:value-type="string">
            <text:p text:style-name="P8">17</text:p>
          </table:table-cell>
          <table:table-cell table:style-name="Tabla1.A1" office:value-type="string">
            <text:p text:style-name="P8">359.99</text:p>
          </table:table-cell>
          <table:table-cell table:style-name="Tabla1.A1" office:value-type="string">
            <text:p text:style-name="P8">1.240524959667</text:p>
          </table:table-cell>
          <table:table-cell table:style-name="Tabla1.A1" office:value-type="string">
            <text:p text:style-name="P8">1.240524959667</text:p>
          </table:table-cell>
        </table:table-row>
      </table:table>
      <text:p text:style-name="P2">La identidad de los decimales en todas las etapas del proceso demuestra una correspondencia métrica exacta entre ambos enfoques, validando la estabilidad formal de la constante frente a errores de redondeo o truncamiento numérico.</text:p>
      <text:h text:style-name="P4" text:outline-level="2">4. Conclusiones e Implicaciones Tecnológicas</text:h>
      <text:p text:style-name="P2">Se ha demostrado y validado la existencia de la constante de bisección asintótica $1.240524959667...$. Desde una perspectiva teórica, el fenómeno comprueba que <text:soft-page-break/>disponer de una cardinalidad infinita de vértices ($n \to \infty$) no es condición suficiente para lograr la saturación métrica total de un espacio curvo si la distribución de los nodos decae de forma geométrica exponencial.</text:p>
      <text:p text:style-name="P2">En el ámbito del desarrollo de software y gráficos por computadora, este hallazgo posee aplicaciones directas en la optimización de <text:span text:style-name="T1">motores de renderizado y mallas de vóxeles (Voxel-Based Engines)</text:span>. Cuando las mallas adaptativas subdividen sus polígonos de forma masiva cerca de discontinuidades o geometrías complejas, suelen inducir desbordamientos u operaciones redundantes en el búfer de mallas. La integración de la constante de Briceño-Gauss como un criterio analítico de parada (<text:span text:style-name="T4">early exit</text:span>) permite predecir el límite de ganancia de área de la subdivisión antes de procesar las coordenadas en la GPU, reduciendo significativamente la carga computacional en procesos de teselación adaptativa.</text:p>
      <text:h text:style-name="P4" text:outline-level="2">Referencias</text:h>
      <text:list text:style-name="L1">
        <text:list-item>
          <text:p text:style-name="P9">Gauss, C. F. (1800). <text:span text:style-name="T4">Theoria motus corporum coelestium in sectionibus conicis solem ambientium</text:span>.</text:p>
        </text:list-item>
        <text:list-item>
          <text:p text:style-name="P9">Preparata, F. P., &amp; Shamos, M. I. (1985). <text:span text:style-name="T4">Computational Geometry: An Introduction</text:span>. Springer-Verlag.</text:p>
        </text:list-item>
        <text:list-item>
          <text:p text:style-name="P9">Arfken, G. B., &amp; Weber, H. J. (2005). <text:span text:style-name="T4">Mathematical Methods for Physicists</text:span>. Elsevier Academic Pres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text:span text:style-name="T4">Español:</text:span> Sobre una Constante de Bisección Angular Asintótica en Polígonos Inscritos: El Límite de Briceño-Gauss</text:p>
      <text:list text:style-name="L2">
        <text:list-item>
          <text:p text:style-name="P12"><text:span text:style-name="T4">English:</text:span> On an Asymptotic Angular Bisection Constant in Inscribed Polygons: The Briceño-Gauss Limit</text:p>
        </text:list-item>
      </text:list>
      <text:list text:style-name="L3">
        <text:list-item>
          <text:p text:style-name="P13">Descripción Corta (Brief Description):</text:p>
        </text:list-item>
      </text:list>
      <text:p text:style-name="P14">Estudio analítico, geométrico y computacional sobre la convergencia del área de mallas poligonales no convencionales e hiper-densas dentro de una circunferencia unitaria bajo procesos de bisección binaria infinita. Se demuestra la existencia de la constante trascendental $1.240524959667...$ mediante la unificación de la fórmula de determinantes de Gauss (Shoelace) y una serie de diferenciales trigonométricos puros, validando la pérdida de acoplamiento métrico con la curvatura ideal del círculo.</text:p>
      <text:list text:style-name="L4">
        <text:list-item>
          <text:p text:style-name="P15">Resumen (Abstract):</text:p>
        </text:list-item>
      </text:list>
      <text:p text:style-name="P14">Este trabajo formaliza el descubrimiento y la resolución analítica de una nueva constante geométrica de valor $A_{\infty} \approx 1.240524959667...$, obtenida al evaluar el área límite de una mallas poligonal irregular inscrita en una circunferencia de radio unitario ($R=1$). El proceso iterativo genera nuevos vértices mediante la bisección angular binaria consecutiva de la distancia restante hacia un punto de acumulación asintótico horizontal ($360^\circ$). Utilizando el algoritmo de coordenadas cerradas de Gauss (Shoelace Formula), el sistema exhibe un estancamiento absoluto del crecimiento del área debido al confinamiento espacial de los nodos. Para validar este límite, se dedujo una serie analítica basada en la diferencia <text:span text:style-name="T5">geométrica</text:span> de cuerdas trigonométricas complementarias, cuya tasa de decaimiento en el límite infinitesimal cumple con una relación geométrica octal ($1/8$). Se demuestra una correspondencia numérica y decimal exacta entre la simulación algorítmica y la abstracción matemática. Finalmente, se discuten sus aplicaciones directas en la optimización de criterios de parada (<text:span text:style-name="T4">early exit</text:span>) para el desarrollo de motores gráficos y mallas adaptativas de vóxeles (<text:span text:style-name="T4">Voxel-Based Engines</text:span>).</text:p>
      <text:list text:style-name="L5">
        <text:list-item>
          <text:p text:style-name="P16">Palabras clave (Keywords):</text:p>
        </text:list-item>
      </text:list>
      <text:p text:style-name="P14">Geometry, Inscribed Polygons, Gauss Shoelace Formula, Angular Bisection, Geometric Convergence, Mathematical Constants, Voxel Mesh Optimizatio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9T13:00:58.310608800</meta:creation-date>
    <dc:date>2026-06-09T13:05:04.880709600</dc:date>
    <meta:editing-duration>PT4M7S</meta:editing-duration>
    <meta:editing-cycles>4</meta:editing-cycles>
    <meta:generator>LibreOffice/26.2.3.2$Windows_X86_64 LibreOffice_project/70e089b17412e4cb7773e41413306b17a2328c34</meta:generator>
    <meta:document-statistic meta:table-count="1" meta:image-count="0" meta:object-count="0" meta:page-count="5" meta:paragraph-count="85" meta:word-count="1405" meta:character-count="10055" meta:non-whitespace-character-count="8742"/>
  </office:meta>
</office:document-meta>
</file>