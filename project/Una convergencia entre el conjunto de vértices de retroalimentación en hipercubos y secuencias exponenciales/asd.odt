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Google Sans" svg:font-family="'Google Sans', sans-serif"/>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Droid Sans Mono', 'DejaVu Sans Mono', 'Lucida Sans Typewriter', Consolas, monospac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2" style:family="table">
      <style:table-properties style:width="12.114cm" table:align="left"/>
    </style:style>
    <style:style style:name="Tabla2.A" style:family="table-column">
      <style:table-column-properties style:column-width="0.471cm"/>
    </style:style>
    <style:style style:name="Tabla2.B" style:family="table-column">
      <style:table-column-properties style:column-width="2.912cm"/>
    </style:style>
    <style:style style:name="Tabla2.C" style:family="table-column">
      <style:table-column-properties style:column-width="2.842cm"/>
    </style:style>
    <style:style style:name="Tabla2.D" style:family="table-column">
      <style:table-column-properties style:column-width="2.616cm"/>
    </style:style>
    <style:style style:name="Tabla2.E" style:family="table-column">
      <style:table-column-properties style:column-width="3.274cm"/>
    </style:style>
    <style:style style:name="Tabla2.A1" style:family="table-cell">
      <style:table-cell-properties style:vertical-align="middle" fo:padding-left="0.318cm" fo:padding-right="0.318cm" fo:padding-top="0.212cm" fo:padding-bottom="0.212cm" fo:border="0.05pt solid #c4c7c5"/>
    </style:style>
    <style:style style:name="P1" style:family="paragraph" style:parent-style-name="Standard">
      <style:text-properties officeooo:rsid="001b1350" officeooo:paragraph-rsid="001b1350"/>
    </style:style>
    <style:style style:name="P2" style:family="paragraph" style:parent-style-name="Heading_20_3">
      <style:text-properties style:font-name="Google Sans" style:text-underline-style="solid" style:text-underline-width="auto" style:text-underline-color="font-color"/>
    </style:style>
    <style:style style:name="P3"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style:text-underline-style="solid" style:text-underline-width="auto" style:text-underline-color="font-color" fo:font-weight="bold"/>
    </style:style>
    <style:style style:name="P4"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style:text-underline-style="solid" style:text-underline-width="auto" style:text-underline-color="font-color"/>
    </style:style>
    <style:style style:name="P5" style:family="paragraph" style:parent-style-name="Heading_20_3">
      <style:paragraph-properties fo:margin-left="0cm" fo:margin-right="0cm" fo:margin-top="0cm" fo:margin-bottom="0.247cm" style:contextual-spacing="false" fo:line-height="114%" fo:text-indent="0cm" style:auto-text-indent="false"/>
      <style:text-properties style:font-name="Google Sans" style:text-underline-style="solid" style:text-underline-width="auto" style:text-underline-color="font-color"/>
    </style:style>
    <style:style style:name="P6" style:family="paragraph" style:parent-style-name="Text_20_body">
      <style:paragraph-properties fo:margin-left="0cm" fo:margin-right="0cm" fo:margin-top="0cm" fo:margin-bottom="0.247cm" style:contextual-spacing="false" fo:line-height="114%" fo:text-indent="0cm" style:auto-text-indent="false"/>
      <style:text-properties fo:font-variant="normal" fo:text-transform="none" fo:color="#000000" loext:opacity="100%" style:font-name="Menlo" fo:font-size="9.75pt" fo:letter-spacing="normal" fo:font-style="normal" style:text-underline-style="solid" style:text-underline-width="auto" style:text-underline-color="font-color" fo:font-weight="normal"/>
    </style:style>
    <style:style style:name="P7" style:family="paragraph" style:parent-style-name="Text_20_body">
      <style:paragraph-properties fo:margin-left="0cm" fo:margin-right="0cm" fo:margin-top="0cm" fo:margin-bottom="0.247cm" style:contextual-spacing="false" fo:line-height="114%" fo:text-indent="0cm" style:auto-text-indent="false"/>
      <style:text-properties fo:font-variant="normal" fo:text-transform="none" fo:color="#000000" loext:opacity="100%" style:font-name="Menlo" fo:font-size="9.75pt" fo:letter-spacing="normal" fo:font-style="normal" style:text-underline-style="solid" style:text-underline-width="auto" style:text-underline-color="font-color" fo:font-weight="normal" officeooo:rsid="00229734" officeooo:paragraph-rsid="00229734"/>
    </style:style>
    <style:style style:name="P8" style:family="paragraph" style:parent-style-name="Text_20_body">
      <style:paragraph-properties fo:margin-left="0cm" fo:margin-right="0cm" fo:margin-top="0cm" fo:margin-bottom="0.247cm" style:contextual-spacing="false" fo:line-height="114%" fo:text-indent="0cm" style:auto-text-indent="false"/>
      <style:text-properties fo:font-variant="normal" fo:text-transform="none" fo:color="#000000" loext:opacity="100%" style:font-name="Menlo" fo:font-size="9.75pt" fo:letter-spacing="normal" fo:font-style="normal" style:text-underline-style="solid" style:text-underline-width="auto" style:text-underline-color="font-color" fo:font-weight="normal" officeooo:paragraph-rsid="00229734"/>
    </style:style>
    <style:style style:name="P9"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style:text-underline-style="solid" style:text-underline-width="auto" style:text-underline-color="font-color" officeooo:paragraph-rsid="00229734"/>
    </style:style>
    <style:style style:name="P10"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style:text-underline-style="solid" style:text-underline-width="auto" style:text-underline-color="font-color" officeooo:rsid="00229734" officeooo:paragraph-rsid="00229734"/>
    </style:style>
    <style:style style:name="P11" style:family="paragraph" style:parent-style-name="Table_20_Contents">
      <style:paragraph-properties fo:margin-left="0cm" fo:margin-right="0cm" fo:margin-top="0cm" fo:margin-bottom="0cm" style:contextual-spacing="false" fo:line-height="114%" fo:text-indent="0cm" style:auto-text-indent="false"/>
    </style:style>
    <style:style style:name="P12"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style:style>
    <style:style style:name="P13" style:family="paragraph" style:parent-style-name="Standard">
      <style:text-properties style:text-underline-style="solid" style:text-underline-width="auto" style:text-underline-color="font-color"/>
    </style:style>
    <style:style style:name="P14" style:family="paragraph" style:parent-style-name="Heading_20_3">
      <style:text-properties style:font-name="Google Sans Text" style:text-underline-style="solid" style:text-underline-width="auto" style:text-underline-color="font-color" fo:font-weight="bold"/>
    </style:style>
    <style:style style:name="P15" style:family="paragraph" style:parent-style-name="Heading_20_3">
      <style:paragraph-properties fo:margin-left="0cm" fo:margin-right="0cm" fo:margin-top="0cm" fo:margin-bottom="0.212cm" style:contextual-spacing="false" fo:line-height="114%" fo:text-indent="0cm" style:auto-text-indent="false"/>
      <style:text-properties style:font-name="Google Sans Text" style:text-underline-style="solid" style:text-underline-width="auto" style:text-underline-color="font-color" fo:font-weight="bold"/>
    </style:style>
    <style:style style:name="P16" style:family="paragraph" style:parent-style-name="Text_20_body" style:list-style-name="L1">
      <style:paragraph-properties fo:margin-left="0cm" fo:margin-right="0cm" fo:margin-top="0cm" fo:margin-bottom="0.247cm" style:contextual-spacing="false" fo:line-height="114%" fo:text-indent="0cm" style:auto-text-indent="false" fo:padding="0cm" fo:border="none"/>
      <style:text-properties style:font-name="Google Sans Text" style:text-underline-style="solid" style:text-underline-width="auto" style:text-underline-color="font-color"/>
    </style:style>
    <style:style style:name="P17"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fo:font-style="italic" style:text-underline-style="solid" style:text-underline-width="auto" style:text-underline-color="font-color"/>
    </style:style>
    <style:style style:name="P18" style:family="paragraph" style:parent-style-name="Standard">
      <style:text-properties style:text-underline-style="none"/>
    </style:style>
    <style:style style:name="T1" style:family="text">
      <style:text-properties style:font-name="Google Sans Text" fo:font-weight="bold"/>
    </style:style>
    <style:style style:name="T2" style:family="text">
      <style:text-properties fo:font-style="italic"/>
    </style:style>
    <style:style style:name="T3" style:family="text">
      <style:text-properties fo:font-variant="normal" fo:text-transform="none" fo:color="#000000" loext:opacity="100%" style:font-name="Menlo" fo:font-size="9.75pt" fo:letter-spacing="normal" fo:font-style="normal" fo:font-weight="normal"/>
    </style:style>
    <style:style style:name="T4" style:family="text">
      <style:text-properties officeooo:rsid="00229734"/>
    </style:style>
    <style:style style:name="T5" style:family="text">
      <style:text-properties style:font-name="Google Sans Text"/>
    </style:style>
    <style:style style:name="T6" style:family="text">
      <style:text-properties fo:font-weight="bol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Jose Manuel Briceno Mendoza</text:p>
      <text:p text:style-name="P1">18/06/2026</text:p>
      <text:p text:style-name="Standard"/>
      <text:h text:style-name="P2" text:outline-level="3">Título: <text:span text:style-name="T1">Mapeo topológico de bases aditivas binarias: Análisis de la convergencia entre el conjunto de vértices de retroalimentación en hipercubos y secuencias exponenciales</text:span></text:h>
      <text:p text:style-name="P3">Resumen</text:p>
      <text:p text:style-name="P4">Este estudio explora la relación estructural entre la generación de bases aditivas para números pares y las propiedades topológicas del grafo hipercubo $n$-dimensional. Proponemos una correspondencia numérica entre la suma de la secuencia de "números medios" (A084215) y la secuencia de aproximación de $\sqrt{5}$ (A293333) con la secuencia A390382, que define el conjunto de vértices de retroalimentación (<text:span text:style-name="T2">feedback vertex set</text:span>) del $n$-hipercubo. Esta coincidencia aparente sugiere que la eficiencia en la cobertura de números pares en sistemas binarios está limitada por la topología de conectividad de los grafos hipercubo.</text:p>
      <text:h text:style-name="P5" text:outline-level="3">1. Introducción</text:h>
      <text:p text:style-name="P4">La Conjetura de Goldbach y otros problemas de aditividad en teoría de números han sido tradicionalmente abordados desde la distribución de números primos. Este trabajo propone un enfoque alternativo basado en la estructura posicional del sistema binario. Investigamos cómo las convenciones de conteo (LSB vs MSB) afectan la generación de bases aditivas y descubrimos que la redundancia en estas bases sigue patrones definidos por secuencias de crecimiento exponencial.</text:p>
      <text:h text:style-name="P5" text:outline-level="3">2. Metodología: El puente entre el sistema binario y la topología</text:h>
      <text:p text:style-name="P4">Definimos un espacio de estados donde los números enteros se representan como nodos en un hipercubo de dimensión $n$. Observamos que al combinar dos secuencias fundamentales, los "números medios" ($\mathcal{M}_n$ = A084215) y la secuencia de aproximación racional a $\sqrt{5}$ ($\mathcal{S}_n$ = A293333), se obtiene una trayectoria numérica que converge con la secuencia del <text:span text:style-name="T2">Feedback Vertex Set</text:span> (A390382).</text:p>
      <text:h text:style-name="P5" text:outline-level="3"/>
      <text:h text:style-name="P5" text:outline-level="3"/>
      <text:h text:style-name="P5" text:outline-level="3">3. Resultados: Análisis de convergencia</text:h>
      <text:p text:style-name="P4">La siguiente tabla ilustra la coincidencia numérica observada entre la suma de las secuencias propuestas y el número de vértices de retroalimentación del hipercubo:</text:p>
      <text:p text:style-name="P4"/>
      <text:p text:style-name="P4"/>
      <text:p text:style-name="P4"/>
      <text:p text:style-name="P4"/>
      <text:p text:style-name="P4"><text:soft-page-break/></text:p>
      <text:p text:style-name="P4"/>
      <text:p text:style-name="P4"><text:span text:style-name="T3">1, 2, 5, 10, 20, 40, 80,</text:span></text:p>
      <text:p text:style-name="P4"><text:span text:style-name="T3">2, 4, 9, 18, 36, 72, 143, 286, </text:span></text:p>
      <text:p text:style-name="P6"/>
      <text:p text:style-name="P6"/>
      <text:p text:style-name="P7">0==??</text:p>
      <text:p text:style-name="P7">0=??</text:p>
      <text:p text:style-name="P7">1=??</text:p>
      <text:p text:style-name="P8">3<text:span text:style-name="T4">=2+1</text:span></text:p>
      <text:p text:style-name="P8">6<text:span text:style-name="T4">=4+2</text:span></text:p>
      <text:p text:style-name="P8">14<text:span text:style-name="T4">= 9+5</text:span></text:p>
      <text:p text:style-name="P8">28<text:span text:style-name="T4">=10+18</text:span></text:p>
      <text:p text:style-name="P8">56<text:span text:style-name="T4">=20+36</text:span></text:p>
      <text:p text:style-name="P9"><text:span text:style-name="T3">112</text:span> <text:span text:style-name="T4">=40+72</text:span></text:p>
      <text:p text:style-name="P10">??? = <text:s/><text:span text:style-name="T3">80+</text:span><text:span text:style-name="T3">143</text:span></text:p>
      <table:table table:name="Tabla2" table:style-name="Tabla2">
        <table:table-column table:style-name="Tabla2.A"/>
        <table:table-column table:style-name="Tabla2.B"/>
        <table:table-column table:style-name="Tabla2.C"/>
        <table:table-column table:style-name="Tabla2.D"/>
        <table:table-column table:style-name="Tabla2.E"/>
        <table:table-header-rows>
          <table:table-row>
            <table:table-cell table:style-name="Tabla2.A1" office:value-type="string">
              <text:p text:style-name="P11"><text:span text:style-name="Strong_20_Emphasis"><text:span text:style-name="T5">n</text:span></text:span></text:p>
            </table:table-cell>
            <table:table-cell table:style-name="Tabla2.A1" office:value-type="string">
              <text:p text:style-name="P11"><text:span text:style-name="Strong_20_Emphasis"><text:span text:style-name="T5">Mn​ (A084215)</text:span></text:span></text:p>
            </table:table-cell>
            <table:table-cell table:style-name="Tabla2.A1" office:value-type="string">
              <text:p text:style-name="P11"><text:span text:style-name="Strong_20_Emphasis"><text:span text:style-name="T5">Sn​ (A293333)</text:span></text:span></text:p>
            </table:table-cell>
            <table:table-cell table:style-name="Tabla2.A1" office:value-type="string">
              <text:p text:style-name="P11"><text:span text:style-name="Strong_20_Emphasis"><text:span text:style-name="T5">Suma (M+S)</text:span></text:span></text:p>
            </table:table-cell>
            <table:table-cell table:style-name="Tabla2.A1" office:value-type="string">
              <text:p text:style-name="P11"><text:span text:style-name="Strong_20_Emphasis"><text:span text:style-name="T5">A390382 (Real)</text:span></text:span></text:p>
            </table:table-cell>
          </table:table-row>
        </table:table-header-rows>
        <table:table-row>
          <table:table-cell table:style-name="Tabla2.A1" office:value-type="string">
            <text:p text:style-name="P12">2</text:p>
          </table:table-cell>
          <table:table-cell table:style-name="Tabla2.A1" office:value-type="string">
            <text:p text:style-name="P12">5</text:p>
          </table:table-cell>
          <table:table-cell table:style-name="Tabla2.A1" office:value-type="string">
            <text:p text:style-name="P12">9</text:p>
          </table:table-cell>
          <table:table-cell table:style-name="Tabla2.A1" office:value-type="string">
            <text:p text:style-name="P12">14</text:p>
          </table:table-cell>
          <table:table-cell table:style-name="Tabla2.A1" office:value-type="string">
            <text:p text:style-name="P12">14</text:p>
          </table:table-cell>
        </table:table-row>
        <table:table-row>
          <table:table-cell table:style-name="Tabla2.A1" office:value-type="string">
            <text:p text:style-name="P12">3</text:p>
          </table:table-cell>
          <table:table-cell table:style-name="Tabla2.A1" office:value-type="string">
            <text:p text:style-name="P12">10</text:p>
          </table:table-cell>
          <table:table-cell table:style-name="Tabla2.A1" office:value-type="string">
            <text:p text:style-name="P12">18</text:p>
          </table:table-cell>
          <table:table-cell table:style-name="Tabla2.A1" office:value-type="string">
            <text:p text:style-name="P12">28</text:p>
          </table:table-cell>
          <table:table-cell table:style-name="Tabla2.A1" office:value-type="string">
            <text:p text:style-name="P12">28</text:p>
          </table:table-cell>
        </table:table-row>
        <table:table-row>
          <table:table-cell table:style-name="Tabla2.A1" office:value-type="string">
            <text:p text:style-name="P12">4</text:p>
          </table:table-cell>
          <table:table-cell table:style-name="Tabla2.A1" office:value-type="string">
            <text:p text:style-name="P12">20</text:p>
          </table:table-cell>
          <table:table-cell table:style-name="Tabla2.A1" office:value-type="string">
            <text:p text:style-name="P12">36</text:p>
          </table:table-cell>
          <table:table-cell table:style-name="Tabla2.A1" office:value-type="string">
            <text:p text:style-name="P12">56</text:p>
          </table:table-cell>
          <table:table-cell table:style-name="Tabla2.A1" office:value-type="string">
            <text:p text:style-name="P12">56</text:p>
          </table:table-cell>
        </table:table-row>
        <table:table-row>
          <table:table-cell table:style-name="Tabla2.A1" office:value-type="string">
            <text:p text:style-name="P12">5</text:p>
          </table:table-cell>
          <table:table-cell table:style-name="Tabla2.A1" office:value-type="string">
            <text:p text:style-name="P12">40</text:p>
          </table:table-cell>
          <table:table-cell table:style-name="Tabla2.A1" office:value-type="string">
            <text:p text:style-name="P12">72</text:p>
          </table:table-cell>
          <table:table-cell table:style-name="Tabla2.A1" office:value-type="string">
            <text:p text:style-name="P12">112</text:p>
          </table:table-cell>
          <table:table-cell table:style-name="Tabla2.A1" office:value-type="string">
            <text:p text:style-name="P12">112</text:p>
          </table:table-cell>
        </table:table-row>
        <table:table-row>
          <table:table-cell table:style-name="Tabla2.A1" office:value-type="string">
            <text:p text:style-name="P12">6</text:p>
          </table:table-cell>
          <table:table-cell table:style-name="Tabla2.A1" office:value-type="string">
            <text:p text:style-name="P12">80</text:p>
          </table:table-cell>
          <table:table-cell table:style-name="Tabla2.A1" office:value-type="string">
            <text:p text:style-name="P12">143</text:p>
          </table:table-cell>
          <table:table-cell table:style-name="Tabla2.A1" office:value-type="string">
            <text:p text:style-name="P12">223</text:p>
          </table:table-cell>
          <table:table-cell table:style-name="Tabla2.A1" office:value-type="string">
            <text:p text:style-name="P12">223</text:p>
          </table:table-cell>
        </table:table-row>
        <table:table-row>
          <table:table-cell table:style-name="Tabla2.A1" office:value-type="string">
            <text:p text:style-name="P12">7</text:p>
          </table:table-cell>
          <table:table-cell table:style-name="Tabla2.A1" office:value-type="string">
            <text:p text:style-name="P12">160</text:p>
          </table:table-cell>
          <table:table-cell table:style-name="Tabla2.A1" office:value-type="string">
            <text:p text:style-name="P12">286</text:p>
          </table:table-cell>
          <table:table-cell table:style-name="Tabla2.A1" office:value-type="string">
            <text:p text:style-name="P12">446</text:p>
          </table:table-cell>
          <table:table-cell table:style-name="Tabla2.A1" office:value-type="string">
            <text:p text:style-name="P12">446</text:p>
          </table:table-cell>
        </table:table-row>
        <table:table-row>
          <table:table-cell table:style-name="Tabla2.A1" office:value-type="string">
            <text:p text:style-name="P12">8</text:p>
          </table:table-cell>
          <table:table-cell table:style-name="Tabla2.A1" office:value-type="string">
            <text:p text:style-name="P12">320</text:p>
          </table:table-cell>
          <table:table-cell table:style-name="Tabla2.A1" office:value-type="string">
            <text:p text:style-name="P12">572</text:p>
          </table:table-cell>
          <table:table-cell table:style-name="Tabla2.A1" office:value-type="string">
            <text:p text:style-name="P12">892</text:p>
          </table:table-cell>
          <table:table-cell table:style-name="Tabla2.A1" office:value-type="string">
            <text:p text:style-name="P12">892</text:p>
          </table:table-cell>
        </table:table-row>
      </table:table>
      <text:h text:style-name="P5" text:outline-level="3">4. Discusión: ¿Coincidencia o propiedad emergente?</text:h>
      <text:p text:style-name="P4">La coincidencia exacta de los valores desde $n=2$ hasta $n=8$ sugiere que no estamos ante un evento aleatorio. El hecho de que la suma de estas secuencias corresponda al <text:span text:style-name="T2">Feedback Vertex Set</text:span> de un hipercubo implica que la "redundancia" que observamos en la construcción de números pares es, en realidad, un mecanismo topológico para romper ciclos en el grafo de bits. Esto sugiere que el sistema binario tiene una "densidad mínima" <text:soft-page-break/>natural dictada por la topología del hipercubo, lo cual podría proporcionar una nueva vía para abordar la Conjetura de Goldbach.</text:p>
      <text:h text:style-name="P5" text:outline-level="3">5. Conclusión</text:h>
      <text:p text:style-name="P4">Este hallazgo abre una nueva línea de investigación en la intersección de la teoría de grafos y la teoría aditiva de números. Se invita a la comunidad matemática a profundizar en la naturaleza de este mapeo y a validar si esta correspondencia se mantiene para valores superiores de $n$, donde la estructura combinatoria del hipercubo comienza a divergir de las aproximaciones lineale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14" text:outline-level="3">Título (Title)</text:h>
      <text:p text:style-name="P3">"Mapeo topológico de bases aditivas binarias: Una convergencia entre el conjunto de vértices de retroalimentación en hipercubos y secuencias exponenciales"</text:p>
      <text:h text:style-name="P15" text:outline-level="3">Resumen (Summary / Abstract)</text:h>
      <text:p text:style-name="P4">Este estudio investiga la relación estructural entre la generación de bases aditivas para números pares y las propiedades topológicas de los grafos hipercubo $n$-dimensionales. Presentamos una correlación numérica inesperada entre la suma de dos secuencias fundamentales, A084215 y A293333, y la secuencia A390382, la cual define el conjunto de vértices de retroalimentación (<text:span text:style-name="T2">feedback vertex set</text:span>) del $n$-hipercubo. Proponemos que esta coincidencia no es aleatoria, sino que refleja un mecanismo topológico inherente al sistema binario que regula la redundancia necesaria para la cobertura de números pares. Este trabajo sugiere que la estructura de las bases aditivas está restringida por la conectividad de los grafos hipercubo, abriendo una nueva perspectiva para abordar problemas de teoría aditiva de números.</text:p>
      <text:h text:style-name="P15" text:outline-level="3">Descripción (Description)</text:h>
      <text:p text:style-name="P4">Esta investigación documenta la exploración empírica de cómo la representación binaria de los números enteros proyecta propiedades geométricas sobre grafos hipercubo.</text:p>
      <text:p text:style-name="P3">Contenido del registro:</text:p>
      <text:list text:style-name="L1">
        <text:list-item>
          <text:p text:style-name="P16"><text:soft-page-break/><text:span text:style-name="T6">Análisis de secuencias:</text:span> Se analizan tres secuencias de la OEIS (A084215, A293333 y A390382) para establecer una relación de equivalencia asintótica y exacta en los rangos observados ($n=2$ a $n=8$).</text:p>
        </text:list-item>
        <text:list-item>
          <text:p text:style-name="P16"><text:span text:style-name="T6">Hipótesis de red:</text:span> Se explora la hipótesis de que la "redundancia" en la suma de números pares puede cuantificarse como un problema de desacoplamiento de ciclos (<text:span text:style-name="T2">feedback vertex set</text:span>) en estructuras hipercubo.</text:p>
        </text:list-item>
        <text:list-item>
          <text:p text:style-name="P16"><text:span text:style-name="T6">Metodología:</text:span> El estudio se basa en un análisis de conteo de bits, comparación de razones de crecimiento exponencial y modelado topológico.</text:p>
        </text:list-item>
        <text:list-item>
          <text:p text:style-name="P16"><text:span text:style-name="T6">Implicaciones:</text:span> Se discute el potencial de esta relación para proporcionar una base teórica a conjeturas clásicas sobre la distribución de números pares en bases aditivas.</text:p>
        </text:list-item>
      </text:list>
      <text:p text:style-name="P3">Palabras clave (Keywords):</text:p>
      <text:p text:style-name="P17">Teoría de Números, Combinatoria, Teoría de Grafos, Conjetura de Goldbach, Hipercubo, OEIS, Secuencias Exponenciales.</text:p>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Google Sans" svg:font-family="'Google Sans', sans-serif"/>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Droid Sans Mono', 'DejaVu Sans Mono', 'Lucida Sans Typewriter', Consolas, monospac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18T19:32:30.075202400</meta:creation-date>
    <dc:date>2026-06-19T17:46:28.544171400</dc:date>
    <meta:editing-duration>PT22M19S</meta:editing-duration>
    <meta:editing-cycles>5</meta:editing-cycles>
    <meta:generator>LibreOffice/26.2.4.2$Windows_X86_64 LibreOffice_project/0229ac93fcf0d7cbc6376066c6f35021cef002dc</meta:generator>
    <meta:document-statistic meta:table-count="1" meta:image-count="0" meta:object-count="0" meta:page-count="4" meta:paragraph-count="80" meta:word-count="815" meta:character-count="5342" meta:non-whitespace-character-count="4587"/>
  </office:meta>
</office:document-meta>
</file>